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57in"/>
    </style:style>
    <style:style style:name="co3" style:family="table-column">
      <style:table-column-properties fo:break-before="auto" style:column-width="3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office:value-type="float" office:value="462411" calcext:value-type="float">
            <text:p>462411</text:p>
          </table:table-cell>
          <table:table-cell office:value-type="string" calcext:value-type="string">
            <text:p>Jessica</text:p>
          </table:table-cell>
          <table:table-cell office:value-type="float" office:value="303122" calcext:value-type="float">
            <text:p>303122</text:p>
          </table:table-cell>
          <table:table-cell office:value-type="string" calcext:value-type="string">
            <text:p>"</text:p>
          </table:table-cell>
          <table:table-cell table:formula="of:=COM.MICROSOFT.CONCAT(&quot;&lt;div data-id=&quot;;[.$F$1];[.B1];[.$F$1];&quot;&gt;&quot;;[.B1];&quot;&lt;/div&gt;&quot;)" office:value-type="string" office:string-value="&lt;div data-id=&quot;Michael&quot;&gt;Michael&lt;/div&gt;" calcext:value-type="string">
            <text:p>&lt;div data-id="Michael"&gt;Michael&lt;/div&gt;</text:p>
          </table:table-cell>
          <table:table-cell/>
          <table:table-cell table:formula="of:=COM.MICROSOFT.CONCAT(&quot;&lt;div data-id=&quot;;[.$F$1];[.D1];[.$F$1];&quot;&gt;&quot;;[.D1];&quot;&lt;/div&gt;&quot;)" office:value-type="string" office:string-value="&lt;div data-id=&quot;Jessica&quot;&gt;Jessica&lt;/div&gt;" calcext:value-type="string">
            <text:p>&lt;div data-id="Jessica"&gt;Jessica&lt;/div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istopher</text:p>
          </table:table-cell>
          <table:table-cell office:value-type="float" office:value="360264" calcext:value-type="float">
            <text:p>360264</text:p>
          </table:table-cell>
          <table:table-cell office:value-type="string" calcext:value-type="string">
            <text:p>Ashley</text:p>
          </table:table-cell>
          <table:table-cell office:value-type="float" office:value="301817" calcext:value-type="float">
            <text:p>301817</text:p>
          </table:table-cell>
          <table:table-cell/>
          <table:table-cell table:formula="of:=COM.MICROSOFT.CONCAT(&quot;&lt;div data-id=&quot;;[.$F$1];[.B2];[.$F$1];&quot;&gt;&quot;;[.B2];&quot;&lt;/div&gt;&quot;)" office:value-type="string" office:string-value="&lt;div data-id=&quot;Christopher&quot;&gt;Christopher&lt;/div&gt;" calcext:value-type="string">
            <text:p>&lt;div data-id="Christopher"&gt;Christopher&lt;/div&gt;</text:p>
          </table:table-cell>
          <table:table-cell/>
          <table:table-cell table:formula="of:=COM.MICROSOFT.CONCAT(&quot;&lt;div data-id=&quot;;[.$F$1];[.D2];[.$F$1];&quot;&gt;&quot;;[.D2];&quot;&lt;/div&gt;&quot;)" office:value-type="string" office:string-value="&lt;div data-id=&quot;Ashley&quot;&gt;Ashley&lt;/div&gt;" calcext:value-type="string">
            <text:p>&lt;div data-id="Ashley"&gt;Ashley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hew</text:p>
          </table:table-cell>
          <table:table-cell office:value-type="float" office:value="351652" calcext:value-type="float">
            <text:p>351652</text:p>
          </table:table-cell>
          <table:table-cell office:value-type="string" calcext:value-type="string">
            <text:p>Emily</text:p>
          </table:table-cell>
          <table:table-cell office:value-type="float" office:value="237254" calcext:value-type="float">
            <text:p>237254</text:p>
          </table:table-cell>
          <table:table-cell/>
          <table:table-cell table:formula="of:=COM.MICROSOFT.CONCAT(&quot;&lt;div data-id=&quot;;[.$F$1];[.B3];[.$F$1];&quot;&gt;&quot;;[.B3];&quot;&lt;/div&gt;&quot;)" office:value-type="string" office:string-value="&lt;div data-id=&quot;Matthew&quot;&gt;Matthew&lt;/div&gt;" calcext:value-type="string">
            <text:p>&lt;div data-id="Matthew"&gt;Matthew&lt;/div&gt;</text:p>
          </table:table-cell>
          <table:table-cell/>
          <table:table-cell table:formula="of:=COM.MICROSOFT.CONCAT(&quot;&lt;div data-id=&quot;;[.$F$1];[.D3];[.$F$1];&quot;&gt;&quot;;[.D3];&quot;&lt;/div&gt;&quot;)" office:value-type="string" office:string-value="&lt;div data-id=&quot;Emily&quot;&gt;Emily&lt;/div&gt;" calcext:value-type="string">
            <text:p>&lt;div data-id="Emily"&gt;Emily&lt;/div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hua</text:p>
          </table:table-cell>
          <table:table-cell office:value-type="float" office:value="329171" calcext:value-type="float">
            <text:p>329171</text:p>
          </table:table-cell>
          <table:table-cell office:value-type="string" calcext:value-type="string">
            <text:p>Sarah</text:p>
          </table:table-cell>
          <table:table-cell office:value-type="float" office:value="224402" calcext:value-type="float">
            <text:p>224402</text:p>
          </table:table-cell>
          <table:table-cell/>
          <table:table-cell table:formula="of:=COM.MICROSOFT.CONCAT(&quot;&lt;div data-id=&quot;;[.$F$1];[.B4];[.$F$1];&quot;&gt;&quot;;[.B4];&quot;&lt;/div&gt;&quot;)" office:value-type="string" office:string-value="&lt;div data-id=&quot;Joshua&quot;&gt;Joshua&lt;/div&gt;" calcext:value-type="string">
            <text:p>&lt;div data-id="Joshua"&gt;Joshua&lt;/div&gt;</text:p>
          </table:table-cell>
          <table:table-cell/>
          <table:table-cell table:formula="of:=COM.MICROSOFT.CONCAT(&quot;&lt;div data-id=&quot;;[.$F$1];[.D4];[.$F$1];&quot;&gt;&quot;;[.D4];&quot;&lt;/div&gt;&quot;)" office:value-type="string" office:string-value="&lt;div data-id=&quot;Sarah&quot;&gt;Sarah&lt;/div&gt;" calcext:value-type="string">
            <text:p>&lt;div data-id="Sarah"&gt;Sarah&lt;/div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cob</text:p>
          </table:table-cell>
          <table:table-cell office:value-type="float" office:value="298402" calcext:value-type="float">
            <text:p>298402</text:p>
          </table:table-cell>
          <table:table-cell office:value-type="string" calcext:value-type="string">
            <text:p>Samantha</text:p>
          </table:table-cell>
          <table:table-cell office:value-type="float" office:value="224011" calcext:value-type="float">
            <text:p>224011</text:p>
          </table:table-cell>
          <table:table-cell/>
          <table:table-cell table:formula="of:=COM.MICROSOFT.CONCAT(&quot;&lt;div data-id=&quot;;[.$F$1];[.B5];[.$F$1];&quot;&gt;&quot;;[.B5];&quot;&lt;/div&gt;&quot;)" office:value-type="string" office:string-value="&lt;div data-id=&quot;Jacob&quot;&gt;Jacob&lt;/div&gt;" calcext:value-type="string">
            <text:p>&lt;div data-id="Jacob"&gt;Jacob&lt;/div&gt;</text:p>
          </table:table-cell>
          <table:table-cell/>
          <table:table-cell table:formula="of:=COM.MICROSOFT.CONCAT(&quot;&lt;div data-id=&quot;;[.$F$1];[.D5];[.$F$1];&quot;&gt;&quot;;[.D5];&quot;&lt;/div&gt;&quot;)" office:value-type="string" office:string-value="&lt;div data-id=&quot;Samantha&quot;&gt;Samantha&lt;/div&gt;" calcext:value-type="string">
            <text:p>&lt;div data-id="Samantha"&gt;Samantha&lt;/div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icholas</text:p>
          </table:table-cell>
          <table:table-cell office:value-type="float" office:value="275321" calcext:value-type="float">
            <text:p>275321</text:p>
          </table:table-cell>
          <table:table-cell office:value-type="string" calcext:value-type="string">
            <text:p>Amanda</text:p>
          </table:table-cell>
          <table:table-cell office:value-type="float" office:value="191124" calcext:value-type="float">
            <text:p>191124</text:p>
          </table:table-cell>
          <table:table-cell/>
          <table:table-cell table:formula="of:=COM.MICROSOFT.CONCAT(&quot;&lt;div data-id=&quot;;[.$F$1];[.B6];[.$F$1];&quot;&gt;&quot;;[.B6];&quot;&lt;/div&gt;&quot;)" office:value-type="string" office:string-value="&lt;div data-id=&quot;Nicholas&quot;&gt;Nicholas&lt;/div&gt;" calcext:value-type="string">
            <text:p>&lt;div data-id="Nicholas"&gt;Nicholas&lt;/div&gt;</text:p>
          </table:table-cell>
          <table:table-cell/>
          <table:table-cell table:formula="of:=COM.MICROSOFT.CONCAT(&quot;&lt;div data-id=&quot;;[.$F$1];[.D6];[.$F$1];&quot;&gt;&quot;;[.D6];&quot;&lt;/div&gt;&quot;)" office:value-type="string" office:string-value="&lt;div data-id=&quot;Amanda&quot;&gt;Amanda&lt;/div&gt;" calcext:value-type="string">
            <text:p>&lt;div data-id="Amanda"&gt;Amanda&lt;/div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ew</text:p>
          </table:table-cell>
          <table:table-cell office:value-type="float" office:value="272911" calcext:value-type="float">
            <text:p>272911</text:p>
          </table:table-cell>
          <table:table-cell office:value-type="string" calcext:value-type="string">
            <text:p>Brittany</text:p>
          </table:table-cell>
          <table:table-cell office:value-type="float" office:value="190819" calcext:value-type="float">
            <text:p>190819</text:p>
          </table:table-cell>
          <table:table-cell/>
          <table:table-cell table:formula="of:=COM.MICROSOFT.CONCAT(&quot;&lt;div data-id=&quot;;[.$F$1];[.B7];[.$F$1];&quot;&gt;&quot;;[.B7];&quot;&lt;/div&gt;&quot;)" office:value-type="string" office:string-value="&lt;div data-id=&quot;Andrew&quot;&gt;Andrew&lt;/div&gt;" calcext:value-type="string">
            <text:p>&lt;div data-id="Andrew"&gt;Andrew&lt;/div&gt;</text:p>
          </table:table-cell>
          <table:table-cell/>
          <table:table-cell table:formula="of:=COM.MICROSOFT.CONCAT(&quot;&lt;div data-id=&quot;;[.$F$1];[.D7];[.$F$1];&quot;&gt;&quot;;[.D7];&quot;&lt;/div&gt;&quot;)" office:value-type="string" office:string-value="&lt;div data-id=&quot;Brittany&quot;&gt;Brittany&lt;/div&gt;" calcext:value-type="string">
            <text:p>&lt;div data-id="Brittany"&gt;Brittany&lt;/div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iel</text:p>
          </table:table-cell>
          <table:table-cell office:value-type="float" office:value="272331" calcext:value-type="float">
            <text:p>272331</text:p>
          </table:table-cell>
          <table:table-cell office:value-type="string" calcext:value-type="string">
            <text:p>Elizabeth</text:p>
          </table:table-cell>
          <table:table-cell office:value-type="float" office:value="172682" calcext:value-type="float">
            <text:p>172682</text:p>
          </table:table-cell>
          <table:table-cell/>
          <table:table-cell table:formula="of:=COM.MICROSOFT.CONCAT(&quot;&lt;div data-id=&quot;;[.$F$1];[.B8];[.$F$1];&quot;&gt;&quot;;[.B8];&quot;&lt;/div&gt;&quot;)" office:value-type="string" office:string-value="&lt;div data-id=&quot;Daniel&quot;&gt;Daniel&lt;/div&gt;" calcext:value-type="string">
            <text:p>&lt;div data-id="Daniel"&gt;Daniel&lt;/div&gt;</text:p>
          </table:table-cell>
          <table:table-cell/>
          <table:table-cell table:formula="of:=COM.MICROSOFT.CONCAT(&quot;&lt;div data-id=&quot;;[.$F$1];[.D8];[.$F$1];&quot;&gt;&quot;;[.D8];&quot;&lt;/div&gt;&quot;)" office:value-type="string" office:string-value="&lt;div data-id=&quot;Elizabeth&quot;&gt;Elizabeth&lt;/div&gt;" calcext:value-type="string">
            <text:p>&lt;div data-id="Elizabeth"&gt;Elizabeth&lt;/div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ler</text:p>
          </table:table-cell>
          <table:table-cell office:value-type="float" office:value="262299" calcext:value-type="float">
            <text:p>262299</text:p>
          </table:table-cell>
          <table:table-cell office:value-type="string" calcext:value-type="string">
            <text:p>Taylor</text:p>
          </table:table-cell>
          <table:table-cell office:value-type="float" office:value="169030" calcext:value-type="float">
            <text:p>169030</text:p>
          </table:table-cell>
          <table:table-cell/>
          <table:table-cell table:formula="of:=COM.MICROSOFT.CONCAT(&quot;&lt;div data-id=&quot;;[.$F$1];[.B9];[.$F$1];&quot;&gt;&quot;;[.B9];&quot;&lt;/div&gt;&quot;)" office:value-type="string" office:string-value="&lt;div data-id=&quot;Tyler&quot;&gt;Tyler&lt;/div&gt;" calcext:value-type="string">
            <text:p>&lt;div data-id="Tyler"&gt;Tyler&lt;/div&gt;</text:p>
          </table:table-cell>
          <table:table-cell/>
          <table:table-cell table:formula="of:=COM.MICROSOFT.CONCAT(&quot;&lt;div data-id=&quot;;[.$F$1];[.D9];[.$F$1];&quot;&gt;&quot;;[.D9];&quot;&lt;/div&gt;&quot;)" office:value-type="string" office:string-value="&lt;div data-id=&quot;Taylor&quot;&gt;Taylor&lt;/div&gt;" calcext:value-type="string">
            <text:p>&lt;div data-id="Taylor"&gt;Taylor&lt;/div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seph</text:p>
          </table:table-cell>
          <table:table-cell office:value-type="float" office:value="260720" calcext:value-type="float">
            <text:p>260720</text:p>
          </table:table-cell>
          <table:table-cell office:value-type="string" calcext:value-type="string">
            <text:p>Megan</text:p>
          </table:table-cell>
          <table:table-cell office:value-type="float" office:value="160368" calcext:value-type="float">
            <text:p>160368</text:p>
          </table:table-cell>
          <table:table-cell/>
          <table:table-cell table:formula="of:=COM.MICROSOFT.CONCAT(&quot;&lt;div data-id=&quot;;[.$F$1];[.B10];[.$F$1];&quot;&gt;&quot;;[.B10];&quot;&lt;/div&gt;&quot;)" office:value-type="string" office:string-value="&lt;div data-id=&quot;Joseph&quot;&gt;Joseph&lt;/div&gt;" calcext:value-type="string">
            <text:p>&lt;div data-id="Joseph"&gt;Joseph&lt;/div&gt;</text:p>
          </table:table-cell>
          <table:table-cell/>
          <table:table-cell table:formula="of:=COM.MICROSOFT.CONCAT(&quot;&lt;div data-id=&quot;;[.$F$1];[.D10];[.$F$1];&quot;&gt;&quot;;[.D10];&quot;&lt;/div&gt;&quot;)" office:value-type="string" office:string-value="&lt;div data-id=&quot;Megan&quot;&gt;Megan&lt;/div&gt;" calcext:value-type="string">
            <text:p>&lt;div data-id="Megan"&gt;Megan&lt;/div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ndon</text:p>
          </table:table-cell>
          <table:table-cell office:value-type="float" office:value="259407" calcext:value-type="float">
            <text:p>259407</text:p>
          </table:table-cell>
          <table:table-cell office:value-type="string" calcext:value-type="string">
            <text:p>Hannah</text:p>
          </table:table-cell>
          <table:table-cell office:value-type="float" office:value="158812" calcext:value-type="float">
            <text:p>158812</text:p>
          </table:table-cell>
          <table:table-cell/>
          <table:table-cell table:formula="of:=COM.MICROSOFT.CONCAT(&quot;&lt;div data-id=&quot;;[.$F$1];[.B11];[.$F$1];&quot;&gt;&quot;;[.B11];&quot;&lt;/div&gt;&quot;)" office:value-type="string" office:string-value="&lt;div data-id=&quot;Brandon&quot;&gt;Brandon&lt;/div&gt;" calcext:value-type="string">
            <text:p>&lt;div data-id="Brandon"&gt;Brandon&lt;/div&gt;</text:p>
          </table:table-cell>
          <table:table-cell/>
          <table:table-cell table:formula="of:=COM.MICROSOFT.CONCAT(&quot;&lt;div data-id=&quot;;[.$F$1];[.D11];[.$F$1];&quot;&gt;&quot;;[.D11];&quot;&lt;/div&gt;&quot;)" office:value-type="string" office:string-value="&lt;div data-id=&quot;Hannah&quot;&gt;Hannah&lt;/div&gt;" calcext:value-type="string">
            <text:p>&lt;div data-id="Hannah"&gt;Hannah&lt;/div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vid</text:p>
          </table:table-cell>
          <table:table-cell office:value-type="float" office:value="253698" calcext:value-type="float">
            <text:p>253698</text:p>
          </table:table-cell>
          <table:table-cell office:value-type="string" calcext:value-type="string">
            <text:p>Kayla</text:p>
          </table:table-cell>
          <table:table-cell office:value-type="float" office:value="155890" calcext:value-type="float">
            <text:p>155890</text:p>
          </table:table-cell>
          <table:table-cell/>
          <table:table-cell table:formula="of:=COM.MICROSOFT.CONCAT(&quot;&lt;div data-id=&quot;;[.$F$1];[.B12];[.$F$1];&quot;&gt;&quot;;[.B12];&quot;&lt;/div&gt;&quot;)" office:value-type="string" office:string-value="&lt;div data-id=&quot;David&quot;&gt;David&lt;/div&gt;" calcext:value-type="string">
            <text:p>&lt;div data-id="David"&gt;David&lt;/div&gt;</text:p>
          </table:table-cell>
          <table:table-cell/>
          <table:table-cell table:formula="of:=COM.MICROSOFT.CONCAT(&quot;&lt;div data-id=&quot;;[.$F$1];[.D12];[.$F$1];&quot;&gt;&quot;;[.D12];&quot;&lt;/div&gt;&quot;)" office:value-type="string" office:string-value="&lt;div data-id=&quot;Kayla&quot;&gt;Kayla&lt;/div&gt;" calcext:value-type="string">
            <text:p>&lt;div data-id="Kayla"&gt;Kayla&lt;/div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mes</text:p>
          </table:table-cell>
          <table:table-cell office:value-type="float" office:value="244945" calcext:value-type="float">
            <text:p>244945</text:p>
          </table:table-cell>
          <table:table-cell office:value-type="string" calcext:value-type="string">
            <text:p>Lauren</text:p>
          </table:table-cell>
          <table:table-cell office:value-type="float" office:value="153585" calcext:value-type="float">
            <text:p>153585</text:p>
          </table:table-cell>
          <table:table-cell/>
          <table:table-cell table:formula="of:=COM.MICROSOFT.CONCAT(&quot;&lt;div data-id=&quot;;[.$F$1];[.B13];[.$F$1];&quot;&gt;&quot;;[.B13];&quot;&lt;/div&gt;&quot;)" office:value-type="string" office:string-value="&lt;div data-id=&quot;James&quot;&gt;James&lt;/div&gt;" calcext:value-type="string">
            <text:p>&lt;div data-id="James"&gt;James&lt;/div&gt;</text:p>
          </table:table-cell>
          <table:table-cell/>
          <table:table-cell table:formula="of:=COM.MICROSOFT.CONCAT(&quot;&lt;div data-id=&quot;;[.$F$1];[.D13];[.$F$1];&quot;&gt;&quot;;[.D13];&quot;&lt;/div&gt;&quot;)" office:value-type="string" office:string-value="&lt;div data-id=&quot;Lauren&quot;&gt;Lauren&lt;/div&gt;" calcext:value-type="string">
            <text:p>&lt;div data-id="Lauren"&gt;Lauren&lt;/div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yan</text:p>
          </table:table-cell>
          <table:table-cell office:value-type="float" office:value="241235" calcext:value-type="float">
            <text:p>241235</text:p>
          </table:table-cell>
          <table:table-cell office:value-type="string" calcext:value-type="string">
            <text:p>Stephanie</text:p>
          </table:table-cell>
          <table:table-cell office:value-type="float" office:value="149836" calcext:value-type="float">
            <text:p>149836</text:p>
          </table:table-cell>
          <table:table-cell/>
          <table:table-cell table:formula="of:=COM.MICROSOFT.CONCAT(&quot;&lt;div data-id=&quot;;[.$F$1];[.B14];[.$F$1];&quot;&gt;&quot;;[.B14];&quot;&lt;/div&gt;&quot;)" office:value-type="string" office:string-value="&lt;div data-id=&quot;Ryan&quot;&gt;Ryan&lt;/div&gt;" calcext:value-type="string">
            <text:p>&lt;div data-id="Ryan"&gt;Ryan&lt;/div&gt;</text:p>
          </table:table-cell>
          <table:table-cell/>
          <table:table-cell table:formula="of:=COM.MICROSOFT.CONCAT(&quot;&lt;div data-id=&quot;;[.$F$1];[.D14];[.$F$1];&quot;&gt;&quot;;[.D14];&quot;&lt;/div&gt;&quot;)" office:value-type="string" office:string-value="&lt;div data-id=&quot;Stephanie&quot;&gt;Stephanie&lt;/div&gt;" calcext:value-type="string">
            <text:p>&lt;div data-id="Stephanie"&gt;Stephanie&lt;/div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hn</text:p>
          </table:table-cell>
          <table:table-cell office:value-type="float" office:value="240127" calcext:value-type="float">
            <text:p>240127</text:p>
          </table:table-cell>
          <table:table-cell office:value-type="string" calcext:value-type="string">
            <text:p>Rachel</text:p>
          </table:table-cell>
          <table:table-cell office:value-type="float" office:value="149159" calcext:value-type="float">
            <text:p>149159</text:p>
          </table:table-cell>
          <table:table-cell/>
          <table:table-cell table:formula="of:=COM.MICROSOFT.CONCAT(&quot;&lt;div data-id=&quot;;[.$F$1];[.B15];[.$F$1];&quot;&gt;&quot;;[.B15];&quot;&lt;/div&gt;&quot;)" office:value-type="string" office:string-value="&lt;div data-id=&quot;John&quot;&gt;John&lt;/div&gt;" calcext:value-type="string">
            <text:p>&lt;div data-id="John"&gt;John&lt;/div&gt;</text:p>
          </table:table-cell>
          <table:table-cell/>
          <table:table-cell table:formula="of:=COM.MICROSOFT.CONCAT(&quot;&lt;div data-id=&quot;;[.$F$1];[.D15];[.$F$1];&quot;&gt;&quot;;[.D15];&quot;&lt;/div&gt;&quot;)" office:value-type="string" office:string-value="&lt;div data-id=&quot;Rachel&quot;&gt;Rachel&lt;/div&gt;" calcext:value-type="string">
            <text:p>&lt;div data-id="Rachel"&gt;Rachel&lt;/div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chary</text:p>
          </table:table-cell>
          <table:table-cell office:value-type="float" office:value="225277" calcext:value-type="float">
            <text:p>225277</text:p>
          </table:table-cell>
          <table:table-cell office:value-type="string" calcext:value-type="string">
            <text:p>Jennifer</text:p>
          </table:table-cell>
          <table:table-cell office:value-type="float" office:value="148032" calcext:value-type="float">
            <text:p>148032</text:p>
          </table:table-cell>
          <table:table-cell/>
          <table:table-cell table:formula="of:=COM.MICROSOFT.CONCAT(&quot;&lt;div data-id=&quot;;[.$F$1];[.B16];[.$F$1];&quot;&gt;&quot;;[.B16];&quot;&lt;/div&gt;&quot;)" office:value-type="string" office:string-value="&lt;div data-id=&quot;Zachary&quot;&gt;Zachary&lt;/div&gt;" calcext:value-type="string">
            <text:p>&lt;div data-id="Zachary"&gt;Zachary&lt;/div&gt;</text:p>
          </table:table-cell>
          <table:table-cell/>
          <table:table-cell table:formula="of:=COM.MICROSOFT.CONCAT(&quot;&lt;div data-id=&quot;;[.$F$1];[.D16];[.$F$1];&quot;&gt;&quot;;[.D16];&quot;&lt;/div&gt;&quot;)" office:value-type="string" office:string-value="&lt;div data-id=&quot;Jennifer&quot;&gt;Jennifer&lt;/div&gt;" calcext:value-type="string">
            <text:p>&lt;div data-id="Jennifer"&gt;Jennifer&lt;/div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stin</text:p>
          </table:table-cell>
          <table:table-cell office:value-type="float" office:value="220119" calcext:value-type="float">
            <text:p>220119</text:p>
          </table:table-cell>
          <table:table-cell office:value-type="string" calcext:value-type="string">
            <text:p>Nicole</text:p>
          </table:table-cell>
          <table:table-cell office:value-type="float" office:value="136099" calcext:value-type="float">
            <text:p>136099</text:p>
          </table:table-cell>
          <table:table-cell/>
          <table:table-cell table:formula="of:=COM.MICROSOFT.CONCAT(&quot;&lt;div data-id=&quot;;[.$F$1];[.B17];[.$F$1];&quot;&gt;&quot;;[.B17];&quot;&lt;/div&gt;&quot;)" office:value-type="string" office:string-value="&lt;div data-id=&quot;Justin&quot;&gt;Justin&lt;/div&gt;" calcext:value-type="string">
            <text:p>&lt;div data-id="Justin"&gt;Justin&lt;/div&gt;</text:p>
          </table:table-cell>
          <table:table-cell/>
          <table:table-cell table:formula="of:=COM.MICROSOFT.CONCAT(&quot;&lt;div data-id=&quot;;[.$F$1];[.D17];[.$F$1];&quot;&gt;&quot;;[.D17];&quot;&lt;/div&gt;&quot;)" office:value-type="string" office:string-value="&lt;div data-id=&quot;Nicole&quot;&gt;Nicole&lt;/div&gt;" calcext:value-type="string">
            <text:p>&lt;div data-id="Nicole"&gt;Nicole&lt;/div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lliam</text:p>
          </table:table-cell>
          <table:table-cell office:value-type="float" office:value="217812" calcext:value-type="float">
            <text:p>217812</text:p>
          </table:table-cell>
          <table:table-cell office:value-type="string" calcext:value-type="string">
            <text:p>Alexis</text:p>
          </table:table-cell>
          <table:table-cell office:value-type="float" office:value="131194" calcext:value-type="float">
            <text:p>131194</text:p>
          </table:table-cell>
          <table:table-cell/>
          <table:table-cell table:formula="of:=COM.MICROSOFT.CONCAT(&quot;&lt;div data-id=&quot;;[.$F$1];[.B18];[.$F$1];&quot;&gt;&quot;;[.B18];&quot;&lt;/div&gt;&quot;)" office:value-type="string" office:string-value="&lt;div data-id=&quot;William&quot;&gt;William&lt;/div&gt;" calcext:value-type="string">
            <text:p>&lt;div data-id="William"&gt;William&lt;/div&gt;</text:p>
          </table:table-cell>
          <table:table-cell/>
          <table:table-cell table:formula="of:=COM.MICROSOFT.CONCAT(&quot;&lt;div data-id=&quot;;[.$F$1];[.D18];[.$F$1];&quot;&gt;&quot;;[.D18];&quot;&lt;/div&gt;&quot;)" office:value-type="string" office:string-value="&lt;div data-id=&quot;Alexis&quot;&gt;Alexis&lt;/div&gt;" calcext:value-type="string">
            <text:p>&lt;div data-id="Alexis"&gt;Alexis&lt;/div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thony</text:p>
          </table:table-cell>
          <table:table-cell office:value-type="float" office:value="216214" calcext:value-type="float">
            <text:p>216214</text:p>
          </table:table-cell>
          <table:table-cell office:value-type="string" calcext:value-type="string">
            <text:p>Victoria</text:p>
          </table:table-cell>
          <table:table-cell office:value-type="float" office:value="117472" calcext:value-type="float">
            <text:p>117472</text:p>
          </table:table-cell>
          <table:table-cell/>
          <table:table-cell table:formula="of:=COM.MICROSOFT.CONCAT(&quot;&lt;div data-id=&quot;;[.$F$1];[.B19];[.$F$1];&quot;&gt;&quot;;[.B19];&quot;&lt;/div&gt;&quot;)" office:value-type="string" office:string-value="&lt;div data-id=&quot;Anthony&quot;&gt;Anthony&lt;/div&gt;" calcext:value-type="string">
            <text:p>&lt;div data-id="Anthony"&gt;Anthony&lt;/div&gt;</text:p>
          </table:table-cell>
          <table:table-cell/>
          <table:table-cell table:formula="of:=COM.MICROSOFT.CONCAT(&quot;&lt;div data-id=&quot;;[.$F$1];[.D19];[.$F$1];&quot;&gt;&quot;;[.D19];&quot;&lt;/div&gt;&quot;)" office:value-type="string" office:string-value="&lt;div data-id=&quot;Victoria&quot;&gt;Victoria&lt;/div&gt;" calcext:value-type="string">
            <text:p>&lt;div data-id="Victoria"&gt;Victoria&lt;/div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bert</text:p>
          </table:table-cell>
          <table:table-cell office:value-type="float" office:value="205445" calcext:value-type="float">
            <text:p>205445</text:p>
          </table:table-cell>
          <table:table-cell office:value-type="string" calcext:value-type="string">
            <text:p>Amber</text:p>
          </table:table-cell>
          <table:table-cell office:value-type="float" office:value="115601" calcext:value-type="float">
            <text:p>115601</text:p>
          </table:table-cell>
          <table:table-cell/>
          <table:table-cell table:formula="of:=COM.MICROSOFT.CONCAT(&quot;&lt;div data-id=&quot;;[.$F$1];[.B20];[.$F$1];&quot;&gt;&quot;;[.B20];&quot;&lt;/div&gt;&quot;)" office:value-type="string" office:string-value="&lt;div data-id=&quot;Robert&quot;&gt;Robert&lt;/div&gt;" calcext:value-type="string">
            <text:p>&lt;div data-id="Robert"&gt;Robert&lt;/div&gt;</text:p>
          </table:table-cell>
          <table:table-cell/>
          <table:table-cell table:formula="of:=COM.MICROSOFT.CONCAT(&quot;&lt;div data-id=&quot;;[.$F$1];[.D20];[.$F$1];&quot;&gt;&quot;;[.D20];&quot;&lt;/div&gt;&quot;)" office:value-type="string" office:string-value="&lt;div data-id=&quot;Amber&quot;&gt;Amber&lt;/div&gt;" calcext:value-type="string">
            <text:p>&lt;div data-id="Amber"&gt;Amber&lt;/div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nathan</text:p>
          </table:table-cell>
          <table:table-cell office:value-type="float" office:value="197493" calcext:value-type="float">
            <text:p>197493</text:p>
          </table:table-cell>
          <table:table-cell office:value-type="string" calcext:value-type="string">
            <text:p>Alyssa</text:p>
          </table:table-cell>
          <table:table-cell office:value-type="float" office:value="115250" calcext:value-type="float">
            <text:p>115250</text:p>
          </table:table-cell>
          <table:table-cell/>
          <table:table-cell table:formula="of:=COM.MICROSOFT.CONCAT(&quot;&lt;div data-id=&quot;;[.$F$1];[.B21];[.$F$1];&quot;&gt;&quot;;[.B21];&quot;&lt;/div&gt;&quot;)" office:value-type="string" office:string-value="&lt;div data-id=&quot;Jonathan&quot;&gt;Jonathan&lt;/div&gt;" calcext:value-type="string">
            <text:p>&lt;div data-id="Jonathan"&gt;Jonathan&lt;/div&gt;</text:p>
          </table:table-cell>
          <table:table-cell/>
          <table:table-cell table:formula="of:=COM.MICROSOFT.CONCAT(&quot;&lt;div data-id=&quot;;[.$F$1];[.D21];[.$F$1];&quot;&gt;&quot;;[.D21];&quot;&lt;/div&gt;&quot;)" office:value-type="string" office:string-value="&lt;div data-id=&quot;Alyssa&quot;&gt;Alyssa&lt;/div&gt;" calcext:value-type="string">
            <text:p>&lt;div data-id="Alyssa"&gt;Alyssa&lt;/div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stin</text:p>
          </table:table-cell>
          <table:table-cell office:value-type="float" office:value="190132" calcext:value-type="float">
            <text:p>190132</text:p>
          </table:table-cell>
          <table:table-cell office:value-type="string" calcext:value-type="string">
            <text:p>Courtney</text:p>
          </table:table-cell>
          <table:table-cell office:value-type="float" office:value="113285" calcext:value-type="float">
            <text:p>113285</text:p>
          </table:table-cell>
          <table:table-cell/>
          <table:table-cell table:formula="of:=COM.MICROSOFT.CONCAT(&quot;&lt;div data-id=&quot;;[.$F$1];[.B22];[.$F$1];&quot;&gt;&quot;;[.B22];&quot;&lt;/div&gt;&quot;)" office:value-type="string" office:string-value="&lt;div data-id=&quot;Austin&quot;&gt;Austin&lt;/div&gt;" calcext:value-type="string">
            <text:p>&lt;div data-id="Austin"&gt;Austin&lt;/div&gt;</text:p>
          </table:table-cell>
          <table:table-cell/>
          <table:table-cell table:formula="of:=COM.MICROSOFT.CONCAT(&quot;&lt;div data-id=&quot;;[.$F$1];[.D22];[.$F$1];&quot;&gt;&quot;;[.D22];&quot;&lt;/div&gt;&quot;)" office:value-type="string" office:string-value="&lt;div data-id=&quot;Courtney&quot;&gt;Courtney&lt;/div&gt;" calcext:value-type="string">
            <text:p>&lt;div data-id="Courtney"&gt;Courtney&lt;/div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xander</text:p>
          </table:table-cell>
          <table:table-cell office:value-type="float" office:value="183938" calcext:value-type="float">
            <text:p>183938</text:p>
          </table:table-cell>
          <table:table-cell office:value-type="string" calcext:value-type="string">
            <text:p>Rebecca</text:p>
          </table:table-cell>
          <table:table-cell office:value-type="float" office:value="109716" calcext:value-type="float">
            <text:p>109716</text:p>
          </table:table-cell>
          <table:table-cell/>
          <table:table-cell table:formula="of:=COM.MICROSOFT.CONCAT(&quot;&lt;div data-id=&quot;;[.$F$1];[.B23];[.$F$1];&quot;&gt;&quot;;[.B23];&quot;&lt;/div&gt;&quot;)" office:value-type="string" office:string-value="&lt;div data-id=&quot;Alexander&quot;&gt;Alexander&lt;/div&gt;" calcext:value-type="string">
            <text:p>&lt;div data-id="Alexander"&gt;Alexander&lt;/div&gt;</text:p>
          </table:table-cell>
          <table:table-cell/>
          <table:table-cell table:formula="of:=COM.MICROSOFT.CONCAT(&quot;&lt;div data-id=&quot;;[.$F$1];[.D23];[.$F$1];&quot;&gt;&quot;;[.D23];&quot;&lt;/div&gt;&quot;)" office:value-type="string" office:string-value="&lt;div data-id=&quot;Rebecca&quot;&gt;Rebecca&lt;/div&gt;" calcext:value-type="string">
            <text:p>&lt;div data-id="Rebecca"&gt;Rebecca&lt;/div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yle</text:p>
          </table:table-cell>
          <table:table-cell office:value-type="float" office:value="180205" calcext:value-type="float">
            <text:p>180205</text:p>
          </table:table-cell>
          <table:table-cell office:value-type="string" calcext:value-type="string">
            <text:p>Danielle</text:p>
          </table:table-cell>
          <table:table-cell office:value-type="float" office:value="109592" calcext:value-type="float">
            <text:p>109592</text:p>
          </table:table-cell>
          <table:table-cell/>
          <table:table-cell table:formula="of:=COM.MICROSOFT.CONCAT(&quot;&lt;div data-id=&quot;;[.$F$1];[.B24];[.$F$1];&quot;&gt;&quot;;[.B24];&quot;&lt;/div&gt;&quot;)" office:value-type="string" office:string-value="&lt;div data-id=&quot;Kyle&quot;&gt;Kyle&lt;/div&gt;" calcext:value-type="string">
            <text:p>&lt;div data-id="Kyle"&gt;Kyle&lt;/div&gt;</text:p>
          </table:table-cell>
          <table:table-cell/>
          <table:table-cell table:formula="of:=COM.MICROSOFT.CONCAT(&quot;&lt;div data-id=&quot;;[.$F$1];[.D24];[.$F$1];&quot;&gt;&quot;;[.D24];&quot;&lt;/div&gt;&quot;)" office:value-type="string" office:string-value="&lt;div data-id=&quot;Danielle&quot;&gt;Danielle&lt;/div&gt;" calcext:value-type="string">
            <text:p>&lt;div data-id="Danielle"&gt;Danielle&lt;/div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evin</text:p>
          </table:table-cell>
          <table:table-cell office:value-type="float" office:value="165217" calcext:value-type="float">
            <text:p>165217</text:p>
          </table:table-cell>
          <table:table-cell office:value-type="string" calcext:value-type="string">
            <text:p>Jasmine</text:p>
          </table:table-cell>
          <table:table-cell office:value-type="float" office:value="105315" calcext:value-type="float">
            <text:p>105315</text:p>
          </table:table-cell>
          <table:table-cell/>
          <table:table-cell table:formula="of:=COM.MICROSOFT.CONCAT(&quot;&lt;div data-id=&quot;;[.$F$1];[.B25];[.$F$1];&quot;&gt;&quot;;[.B25];&quot;&lt;/div&gt;&quot;)" office:value-type="string" office:string-value="&lt;div data-id=&quot;Kevin&quot;&gt;Kevin&lt;/div&gt;" calcext:value-type="string">
            <text:p>&lt;div data-id="Kevin"&gt;Kevin&lt;/div&gt;</text:p>
          </table:table-cell>
          <table:table-cell/>
          <table:table-cell table:formula="of:=COM.MICROSOFT.CONCAT(&quot;&lt;div data-id=&quot;;[.$F$1];[.D25];[.$F$1];&quot;&gt;&quot;;[.D25];&quot;&lt;/div&gt;&quot;)" office:value-type="string" office:string-value="&lt;div data-id=&quot;Jasmine&quot;&gt;Jasmine&lt;/div&gt;" calcext:value-type="string">
            <text:p>&lt;div data-id="Jasmine"&gt;Jasmine&lt;/div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2:01:21.868221322</meta:creation-date>
    <dc:date>2025-03-21T22:26:37.852078803</dc:date>
    <meta:editing-duration>PT15M1S</meta:editing-duration>
    <meta:editing-cycles>1</meta:editing-cycles>
    <meta:document-statistic meta:table-count="1" meta:cell-count="176" meta:object-count="0"/>
    <meta:generator>LibreOffice/24.8.4.2$Linux_X86_64 LibreOffice_project/480$Build-2</meta:generator>
  </office:meta>
</office:document-meta>
</file>